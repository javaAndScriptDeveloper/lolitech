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80000038413F88F9B.png" manifest:media-type="image/png"/>
  <manifest:file-entry manifest:full-path="Pictures/10000000000005780000038421EE84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59cm" fo:margin-top="0cm" fo:margin-bottom="0cm" table:align="center" style:writing-mode="lr-tb"/>
    </style:style>
    <style:style style:name="Table1.A" style:family="table-column">
      <style:table-column-properties style:column-width="5.86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9cm" fo:margin-top="0cm" fo:margin-bottom="0cm" table:align="center" style:writing-mode="lr-tb"/>
    </style:style>
    <style:style style:name="Table2.A" style:family="table-column">
      <style:table-column-properties style:column-width="8.79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9cm" fo:margin-top="0cm" fo:margin-bottom="0cm" table:align="center" style:writing-mode="lr-tb"/>
    </style:style>
    <style:style style:name="Table3.A" style:family="table-column">
      <style:table-column-properties style:column-width="5.86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59cm" fo:margin-top="0cm" fo:margin-bottom="0cm" table:align="center" style:writing-mode="lr-tb"/>
    </style:style>
    <style:style style:name="Table4.A" style:family="table-column">
      <style:table-column-properties style:column-width="4.39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59cm" fo:margin-top="0cm" fo:margin-bottom="0cm" table:align="center" style:writing-mode="lr-tb"/>
    </style:style>
    <style:style style:name="Table5.A" style:family="table-column">
      <style:table-column-properties style:column-width="4.39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59cm" fo:margin-top="0cm" fo:margin-bottom="0cm" table:align="center" style:writing-mode="lr-tb"/>
    </style:style>
    <style:style style:name="Table6.A" style:family="table-column">
      <style:table-column-properties style:column-width="5.863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 fo:break-before="page"/>
    </style:style>
    <style:style style:name="P3" style:family="paragraph" style:parent-style-name="Heading_20_1">
      <style:text-properties fo:color="#000000" loext:opacity="100%" style:font-name="Times New Roman"/>
    </style:style>
    <style:style style:name="P4" style:family="paragraph" style:parent-style-name="Heading_20_2">
      <style:text-properties fo:color="#000000" loext:opacity="100%" style:font-name="Times New Roman"/>
    </style:style>
    <style:style style:name="P5" style:family="paragraph" style:parent-style-name="List_20_1" style:list-style-name="WWNum1"/>
    <style:style style:name="P6" style:family="paragraph" style:parent-style-name="Standard">
      <style:paragraph-properties fo:text-align="center" style:justify-single-word="false"/>
      <style:text-properties style:font-name="Times New Roman" fo:font-size="26pt" fo:font-weight="bold" style:font-size-asian="26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style:font-size-asian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text-properties style:font-name="Times New Roman" fo:font-size="14pt" fo:font-weight="normal" style:font-size-asian="14pt" style:font-weight-asian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fo:font-weight="bold" style:letter-kerning="false" style:font-name-asian="ＭＳ 明朝" style:font-size-asian="12pt" style:language-asian="en" style:country-asian="US" style:font-weight-asian="bold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style:letter-kerning="false" style:font-name-asian="ＭＳ 明朝" style:font-size-asian="12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en" fo:country="US" fo:font-weight="bold" style:letter-kerning="false" style:font-name-asian="ＭＳ 明朝" style:font-size-asian="11pt" style:language-asian="en" style:country-asian="US" style:font-weight-asian="bold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en" fo:country="US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fo:font-weight="bold" style:font-size-asian="14pt" style:font-weight-asian="bold"/>
    </style:style>
    <style:style style:name="T3" style:family="text">
      <style:text-properties style:font-name="Times New Roman" fo:font-size="14pt" fo:font-weight="normal" style:font-size-asian="14pt" style:font-weight-asian="normal"/>
    </style:style>
    <style:style style:name="T4" style:family="text">
      <style:text-properties style:font-name="Times New Roman" fo:font-size="12pt" fo:font-weight="bold" style:font-size-asian="12pt" style:font-weight-asian="bold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fo:color="#000000" loext:opacity="100%" style:font-name="Times New Roman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>Лабораторна Робота №3</text:p>
      <text:p text:style-name="P7">з предмету "СУЧАСНІ КОНЦЕПЦІЇ<text:line-break/>СТВОРЕННЯ<text:line-break/>ІНТЕЛЕКТУАЛЬНИХ<text:line-break/>ІНФОРМАЦІЙНИХ СИСТЕМ"</text:p>
      <text:p text:style-name="Standard"/>
      <text:p text:style-name="Standard"/>
      <text:p text:style-name="Standard"/>
      <text:p text:style-name="Standard"/>
      <text:p text:style-name="P8">Виконав<text:line-break/>аспірант групи IT-з41Ф<text:line-break/>Фещенко Кири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Київ 2026</text:p>
      <text:p text:style-name="Standard"/>
      <text:p text:style-name="P2"><text:span text:style-name="T2">Тема: </text:span><text:span text:style-name="T1">Система моніторингу криптовалютного ринку на основі сокетного програмування та кореляційного аналізу</text:span></text:p>
      <text:h text:style-name="P3" text:outline-level="1">1. Вступ та постановка задачі</text:h>
      <text:h text:style-name="P4" text:outline-level="2">1.1 Мета роботи</text:h>
      <text:p text:style-name="P10">Метою даної лабораторної роботи є розробка системи підтримки прийняття рішень для моніторингу криптовалютного ринку. Система демонструє практичне застосування низькорівневого сокетного програмування (TCP-сокети для протоколів HTTP та NNTP), багатопотокової архітектури, кореляційного аналізу даних та веб-технологій для побудови інтелектуальної інформаційної системи.</text:p>
      <text:h text:style-name="P4" text:outline-level="2">1.2 Теоретичні відомості</text:h>
      <text:p text:style-name="Standard"><text:span text:style-name="T2">Протокол HTTP (Hypertext Transfer Protocol)</text:span><text:span text:style-name="T3"> — протокол прикладного рівня для передачі гіпертекстових документів. У даній роботі реалізовано метод HEAD через сирі TCP-сокети (порт 80) для відстеження змін контенту на сторінках криптовалютних бірж за допомогою заголовка Content-Length.</text:span></text:p>
      <text:p text:style-name="Standard"><text:span text:style-name="T2">Протокол NNTP (Network News Transfer Protocol)</text:span><text:span text:style-name="T3"> — протокол для читання та публікації повідомлень у групах новин Usenet (RFC 3977). Реалізація включає команди GROUP, HEAD, ARTICLE та обробку багаторядкових dot-terminated відповідей через TCP-сокети (порт 119).</text:span></text:p>
      <text:p text:style-name="Standard"><text:span text:style-name="T2">Кореляційний аналіз</text:span><text:span text:style-name="T3"> — метод виявлення залежностей між HTTP-змінами на біржах та активністю у новинних групах. Система обчислює інтегральний показник впевненості для генерації торгових сигналів.</text:span></text:p>
      <text:h text:style-name="P4" text:outline-level="2">1.3 Модель кореляційного аналізу</text:h>
      <text:p text:style-name="P10">Інтегральний показник впевненості S обчислюється за формулою:</text:p>
      <text:p text:style-name="P11">S = S_http + S_nntp + S_groups + S_action</text:p>
      <text:p text:style-name="P10">де складові визначаються наступним чином: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Складова</text:p>
          </table:table-cell>
          <table:table-cell table:style-name="Table1.A1" office:value-type="string">
            <text:p text:style-name="P12">Умова</text:p>
          </table:table-cell>
          <table:table-cell table:style-name="Table1.A1" office:value-type="string">
            <text:p text:style-name="P12">Бали</text:p>
          </table:table-cell>
        </table:table-row>
        <table:table-row table:style-name="Table1.1">
          <table:table-cell table:style-name="Table1.A1" office:value-type="string">
            <text:p text:style-name="P13">S_http</text:p>
          </table:table-cell>
          <table:table-cell table:style-name="Table1.A1" office:value-type="string">
            <text:p text:style-name="P13">Зміна Content-Length на біржі (&gt;5%)</text:p>
          </table:table-cell>
          <table:table-cell table:style-name="Table1.A1" office:value-type="string">
            <text:p text:style-name="P13">+30</text:p>
          </table:table-cell>
        </table:table-row>
        <table:table-row table:style-name="Table1.1">
          <table:table-cell table:style-name="Table1.A1" office:value-type="string">
            <text:p text:style-name="P13">S_nntp</text:p>
          </table:table-cell>
          <table:table-cell table:style-name="Table1.A1" office:value-type="string">
            <text:p text:style-name="P13">Сплеск згадувань (&gt;200% від базової лінії)</text:p>
          </table:table-cell>
          <table:table-cell table:style-name="Table1.A1" office:value-type="string">
            <text:p text:style-name="P13">+40</text:p>
          </table:table-cell>
        </table:table-row>
        <table:table-row table:style-name="Table1.1">
          <table:table-cell table:style-name="Table1.A1" office:value-type="string">
            <text:p text:style-name="P13">S_groups</text:p>
          </table:table-cell>
          <table:table-cell table:style-name="Table1.A1" office:value-type="string">
            <text:p text:style-name="P13">Обговорення у 2+ групах новин</text:p>
          </table:table-cell>
          <table:table-cell table:style-name="Table1.A1" office:value-type="string">
            <text:p text:style-name="P13">+15</text:p>
          </table:table-cell>
        </table:table-row>
        <table:table-row table:style-name="Table1.1">
          <table:table-cell table:style-name="Table1.A1" office:value-type="string">
            <text:p text:style-name="P13">S_action</text:p>
          </table:table-cell>
          <table:table-cell table:style-name="Table1.A1" office:value-type="string">
            <text:p text:style-name="P13">Наявність дієвих слів (listing, <text:soft-page-break/>fork, ETF...)</text:p>
          </table:table-cell>
          <table:table-cell table:style-name="Table1.A1" office:value-type="string">
            <text:p text:style-name="P13">+15</text:p>
          </table:table-cell>
        </table:table-row>
      </table:table>
      <text:p text:style-name="Standard"/>
      <text:p text:style-name="P10">Класифікація подій за показником S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Діапазон S</text:p>
          </table:table-cell>
          <table:table-cell table:style-name="Table2.A1" office:value-type="string">
            <text:p text:style-name="P12">Класифікація</text:p>
          </table:table-cell>
        </table:table-row>
        <table:table-row table:style-name="Table2.1">
          <table:table-cell table:style-name="Table2.A1" office:value-type="string">
            <text:p text:style-name="P13">70–100</text:p>
          </table:table-cell>
          <table:table-cell table:style-name="Table2.A1" office:value-type="string">
            <text:p text:style-name="P13">High Priority Alert (Високий пріоритет)</text:p>
          </table:table-cell>
        </table:table-row>
        <table:table-row table:style-name="Table2.1">
          <table:table-cell table:style-name="Table2.A1" office:value-type="string">
            <text:p text:style-name="P13">50–69</text:p>
          </table:table-cell>
          <table:table-cell table:style-name="Table2.A1" office:value-type="string">
            <text:p text:style-name="P13">Monitor Closely (Уважний моніторинг)</text:p>
          </table:table-cell>
        </table:table-row>
        <table:table-row table:style-name="Table2.1">
          <table:table-cell table:style-name="Table2.A1" office:value-type="string">
            <text:p text:style-name="P13">30–49</text:p>
          </table:table-cell>
          <table:table-cell table:style-name="Table2.A1" office:value-type="string">
            <text:p text:style-name="P13">Informational (Інформаційний)</text:p>
          </table:table-cell>
        </table:table-row>
      </table:table>
      <text:h text:style-name="P3" text:outline-level="1">2. Опис реалізації</text:h>
      <text:h text:style-name="P4" text:outline-level="2">2.1 Архітектура системи</text:h>
      <text:p text:style-name="P10">Система побудована на багатопотоковій архітектурі з трьома робочими потоками та веб-сервером Flask. Міжпотокова комунікація реалізована через об'єкти threading.Event, а потокобезпечний доступ до бази даних забезпечується режимом WAL (Write-Ahead Logging) SQLite з окремим з'єднанням на кожний запит.</text:p>
      <text:p text:style-name="P10"><text:span text:style-name="T7">Код</text:span> → <text:a xlink:type="simple" xlink:href="https://github.com/javaAndScriptDeveloper/agentic_algorithms/tree/master/labThird" text:style-name="Internet_20_link" text:visited-style-name="Visited_20_Internet_20_Link">https://github.com/javaAndScriptDeveloper/agentic_algorithms/tree/master/labThird</text:a></text:p>
      <text:h text:style-name="P4" text:outline-level="2">2.2 Структура проекту</text:h>
      <text:list text:style-name="WWNum1">
        <text:list-item>
          <text:p text:style-name="P5"><text:span text:style-name="T4">app.py</text:span><text:span text:style-name="T5"> — Flask-додаток та оркестратор потоків</text:span></text:p>
        </text:list-item>
        <text:list-item>
          <text:p text:style-name="P5"><text:span text:style-name="T4">database/init_db.py</text:span><text:span text:style-name="T5"> — ініціалізація схеми БД (3 таблиці, WAL-режим)</text:span></text:p>
        </text:list-item>
        <text:list-item>
          <text:p text:style-name="P5"><text:span text:style-name="T4">database/models.py</text:span><text:span text:style-name="T5"> — функції доступу до даних (raw sqlite3, без ORM)</text:span></text:p>
        </text:list-item>
        <text:list-item>
          <text:p text:style-name="P5"><text:span text:style-name="T4">monitors/http_monitor.py</text:span><text:span text:style-name="T5"> — сирий TCP-сокет HTTP HEAD з retry</text:span></text:p>
        </text:list-item>
        <text:list-item>
          <text:p text:style-name="P5"><text:span text:style-name="T4">monitors/nntp_monitor.py</text:span><text:span text:style-name="T5"> — повна реалізація протоколу NNTP через TCP</text:span></text:p>
        </text:list-item>
        <text:list-item>
          <text:p text:style-name="P5"><text:span text:style-name="T4">monitors/http_worker.py</text:span><text:span text:style-name="T5"> — потік HTTP-моніторингу (polling loop)</text:span></text:p>
        </text:list-item>
        <text:list-item>
          <text:p text:style-name="P5"><text:span text:style-name="T4">monitors/nntp_worker.py</text:span><text:span text:style-name="T5"> — потік NNTP-моніторингу (polling loop)</text:span></text:p>
        </text:list-item>
        <text:list-item>
          <text:p text:style-name="P5"><text:span text:style-name="T4">engine/correlator.py</text:span><text:span text:style-name="T5"> — алгоритм кореляційного скорингу</text:span></text:p>
        </text:list-item>
        <text:list-item>
          <text:p text:style-name="P5"><text:span text:style-name="T4">engine/correlator_worker.py</text:span><text:span text:style-name="T5"> — потік кореляційного аналізу (event-driven)</text:span></text:p>
        </text:list-item>
        <text:list-item>
          <text:p text:style-name="P5"><text:span text:style-name="T4">static/css/styles.css</text:span><text:span text:style-name="T5"> — темна тема інтерфейсу (dark crypto aesthetic)</text:span></text:p>
        </text:list-item>
        <text:list-item>
          <text:p text:style-name="P5"><text:span text:style-name="T4">static/js/dashboard.js</text:span><text:span text:style-name="T5"> — клієнтський JavaScript (авто-оновлення кожні 30с)</text:span></text:p>
        </text:list-item>
        <text:list-item>
          <text:p text:style-name="P5"><text:span text:style-name="T4">templates/index.html</text:span><text:span text:style-name="T5"> — шаблон дашборда з трьома панелями</text:span></text:p>
        </text:list-item>
        <text:list-item>
          <text:p text:style-name="P5"><text:span text:style-name="T4">templates/conf.html</text:span><text:span text:style-name="T5"> — сторінка конфігурації з tag-чіпами</text:span></text:p>
        </text:list-item>
      </text:list>
      <text:h text:style-name="P4" text:outline-level="2">2.3 Мережеві протоколи</text:h>
      <text:p text:style-name="Standard"><text:span text:style-name="T2">HTTP-моніторинг: </text:span><text:span text:style-name="T3">реалізовано через сирі TCP-сокети (socket.AF_INET, SOCK_STREAM) на порт 80. Конструюється запит HEAD з заголовком Connection: close для запобігання блокування на keep-alive відповідях. Парсинг </text:span><text:soft-page-break/><text:span text:style-name="T3">Content-Length із заголовків відповіді. Експоненційний backoff при помилках (3 спроби: 1с, 2с, 4с). Відстежуються три біржі: Binance, Coinbase, Kraken.</text:span></text:p>
      <text:p text:style-name="Standard"><text:span text:style-name="T2">NNTP-моніторинг: </text:span><text:span text:style-name="T3">повна реалізація протоколу RFC 3977 через TCP-сокети на порт 119. Підтримуються команди GROUP, HEAD, ARTICLE, QUIT. Обробка dot-terminated багаторядкових відповідей з unescaping подвійних крапок. Сканування ключових слів у заголовках та тілі статей. Підключення до сервера news.neodome.net з групами sci.crypt, misc.invest.stocks, misc.invest.futures.</text:span></text:p>
      <text:h text:style-name="Heading_20_2" text:outline-level="2"><text:span text:style-name="T6">2.4 Потокова модель</text:span>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2">Потік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Сигнали</text:p>
          </table:table-cell>
        </table:table-row>
        <table:table-row table:style-name="Table3.1">
          <table:table-cell table:style-name="Table3.A1" office:value-type="string">
            <text:p text:style-name="P13">HTTP Worker</text:p>
          </table:table-cell>
          <table:table-cell table:style-name="Table3.A1" office:value-type="string">
            <text:p text:style-name="P13">Polling (60с інтервал)</text:p>
          </table:table-cell>
          <table:table-cell table:style-name="Table3.A1" office:value-type="string">
            <text:p text:style-name="P13">Встановлює change_event</text:p>
          </table:table-cell>
        </table:table-row>
        <table:table-row table:style-name="Table3.1">
          <table:table-cell table:style-name="Table3.A1" office:value-type="string">
            <text:p text:style-name="P13">NNTP Worker</text:p>
          </table:table-cell>
          <table:table-cell table:style-name="Table3.A1" office:value-type="string">
            <text:p text:style-name="P13">Polling (120с інтервал)</text:p>
          </table:table-cell>
          <table:table-cell table:style-name="Table3.A1" office:value-type="string">
            <text:p text:style-name="P13">Встановлює article_event</text:p>
          </table:table-cell>
        </table:table-row>
        <table:table-row table:style-name="Table3.1">
          <table:table-cell table:style-name="Table3.A1" office:value-type="string">
            <text:p text:style-name="P13">Correlator</text:p>
          </table:table-cell>
          <table:table-cell table:style-name="Table3.A1" office:value-type="string">
            <text:p text:style-name="P13">Event-driven (30с timeout)</text:p>
          </table:table-cell>
          <table:table-cell table:style-name="Table3.A1" office:value-type="string">
            <text:p text:style-name="P13">Очікує change_event / article_event</text:p>
          </table:table-cell>
        </table:table-row>
      </table:table>
      <text:h text:style-name="P3" text:outline-level="1">3. Результати роботи</text:h>
      <text:h text:style-name="P4" text:outline-level="2">3.1 Веб-інтерфейс — Dashboard</text:h>
      <text:p text:style-name="P10">Головна сторінка системи відображає три панелі в реальному часі: таблицю HTTP-моніторингу бірж, стрічку NNTP-новин з підсвіченими ключовими словами та панель ринкових сигналів з кольоровою індикацією пріоритету.</text:p>
      <text:p text:style-name="P1"><text:soft-page-break/><draw:frame draw:style-name="fr1" draw:name="Picture 1" text:anchor-type="as-char" svg:width="17cm" svg:height="10.929cm" draw:z-index="0"><draw:image xlink:href="Pictures/10000000000005780000038421EE84E4.png" xlink:type="simple" xlink:show="embed" xlink:actuate="onLoad" draw:mime-type="image/png"/></draw:frame></text:p>
      <text:p text:style-name="P14">Рис. 1. Dashboard системи Crypto Market Intelligence</text:p>
      <text:h text:style-name="P4" text:outline-level="2">3.2 Сторінка конфігурації</text:h>
      <text:p text:style-name="P10">Сторінка конфігурації дозволяє в реальному часі змінювати параметри системи: додавати/видаляти відстежувані токени та дієві слова (tag-чіпи), керувати HTTP та NNTP джерелами, налаштовувати порогові значення скорингу. Підтримується імпорт/експорт конфігурації у форматі JSON.</text:p>
      <text:p text:style-name="P1"><text:soft-page-break/><draw:frame draw:style-name="fr1" draw:name="Picture 2" text:anchor-type="as-char" svg:width="17cm" svg:height="10.929cm" draw:z-index="1"><draw:image xlink:href="Pictures/10000000000005780000038413F88F9B.png" xlink:type="simple" xlink:show="embed" xlink:actuate="onLoad" draw:mime-type="image/png"/></draw:frame></text:p>
      <text:p text:style-name="P14">Рис. 2. Сторінка конфігурації системи</text:p>
      <text:h text:style-name="P4" text:outline-level="2">3.3 Результати моніторингу</text:h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15">Компонент</text:p>
          </table:table-cell>
          <table:table-cell table:style-name="Table4.A1" office:value-type="string">
            <text:p text:style-name="P15">Статус</text:p>
          </table:table-cell>
          <table:table-cell table:style-name="Table4.A1" office:value-type="string">
            <text:p text:style-name="P15">Результат</text:p>
          </table:table-cell>
          <table:table-cell table:style-name="Table4.A1" office:value-type="string">
            <text:p text:style-name="P15">Деталі</text:p>
          </table:table-cell>
        </table:table-row>
        <table:table-row table:style-name="Table4.1">
          <table:table-cell table:style-name="Table4.A1" office:value-type="string">
            <text:p text:style-name="P16">HTTP Worker</text:p>
          </table:table-cell>
          <table:table-cell table:style-name="Table4.A1" office:value-type="string">
            <text:p text:style-name="P16">Активний</text:p>
          </table:table-cell>
          <table:table-cell table:style-name="Table4.A1" office:value-type="string">
            <text:p text:style-name="P16">3 біржі відстежуються</text:p>
          </table:table-cell>
          <table:table-cell table:style-name="Table4.A1" office:value-type="string">
            <text:p text:style-name="P16">Content-Length: ~167 байт</text:p>
          </table:table-cell>
        </table:table-row>
        <table:table-row table:style-name="Table4.1">
          <table:table-cell table:style-name="Table4.A1" office:value-type="string">
            <text:p text:style-name="P16">NNTP Worker</text:p>
          </table:table-cell>
          <table:table-cell table:style-name="Table4.A1" office:value-type="string">
            <text:p text:style-name="P16">Активний</text:p>
          </table:table-cell>
          <table:table-cell table:style-name="Table4.A1" office:value-type="string">
            <text:p text:style-name="P16">40 статей отримано</text:p>
          </table:table-cell>
          <table:table-cell table:style-name="Table4.A1" office:value-type="string">
            <text:p text:style-name="P16">2 групи: sci.crypt, misc.invest.stocks</text:p>
          </table:table-cell>
        </table:table-row>
        <table:table-row table:style-name="Table4.1">
          <table:table-cell table:style-name="Table4.A1" office:value-type="string">
            <text:p text:style-name="P16">Correlator</text:p>
          </table:table-cell>
          <table:table-cell table:style-name="Table4.A1" office:value-type="string">
            <text:p text:style-name="P16">Активний</text:p>
          </table:table-cell>
          <table:table-cell table:style-name="Table4.A1" office:value-type="string">
            <text:p text:style-name="P16">30 ринкових подій</text:p>
          </table:table-cell>
          <table:table-cell table:style-name="Table4.A1" office:value-type="string">
            <text:p text:style-name="P16">Score 40–55, типи: regulatory, general</text:p>
          </table:table-cell>
        </table:table-row>
      </table:table>
      <text:p text:style-name="Standard"/>
      <text:p text:style-name="P10">Приклади згенерованих ринкових сигналів: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12">Токен</text:p>
          </table:table-cell>
          <table:table-cell table:style-name="Table5.A1" office:value-type="string">
            <text:p text:style-name="P12">Тип події</text:p>
          </table:table-cell>
          <table:table-cell table:style-name="Table5.A1" office:value-type="string">
            <text:p text:style-name="P12">Score</text:p>
          </table:table-cell>
          <table:table-cell table:style-name="Table5.A1" office:value-type="string">
            <text:p text:style-name="P12">Рекомендація</text:p>
          </table:table-cell>
        </table:table-row>
        <table:table-row table:style-name="Table5.1">
          <table:table-cell table:style-name="Table5.A1" office:value-type="string">
            <text:p text:style-name="P13">ETH</text:p>
          </table:table-cell>
          <table:table-cell table:style-name="Table5.A1" office:value-type="string">
            <text:p text:style-name="P13">regulatory</text:p>
          </table:table-cell>
          <table:table-cell table:style-name="Table5.A1" office:value-type="string">
            <text:p text:style-name="P13">55</text:p>
          </table:table-cell>
          <table:table-cell table:style-name="Table5.A1" office:value-type="string">
            <text:p text:style-name="P13">Monitor Closely</text:p>
          </table:table-cell>
        </table:table-row>
        <table:table-row table:style-name="Table5.1">
          <table:table-cell table:style-name="Table5.A1" office:value-type="string">
            <text:p text:style-name="P13">SOL</text:p>
          </table:table-cell>
          <table:table-cell table:style-name="Table5.A1" office:value-type="string">
            <text:p text:style-name="P13">regulatory</text:p>
          </table:table-cell>
          <table:table-cell table:style-name="Table5.A1" office:value-type="string">
            <text:p text:style-name="P13">55</text:p>
          </table:table-cell>
          <table:table-cell table:style-name="Table5.A1" office:value-type="string">
            <text:p text:style-name="P13">Monitor Closely</text:p>
          </table:table-cell>
        </table:table-row>
        <table:table-row table:style-name="Table5.1">
          <table:table-cell table:style-name="Table5.A1" office:value-type="string">
            <text:p text:style-name="P13">BTC</text:p>
          </table:table-cell>
          <table:table-cell table:style-name="Table5.A1" office:value-type="string">
            <text:p text:style-name="P13">general</text:p>
          </table:table-cell>
          <table:table-cell table:style-name="Table5.A1" office:value-type="string">
            <text:p text:style-name="P13">40</text:p>
          </table:table-cell>
          <table:table-cell table:style-name="Table5.A1" office:value-type="string">
            <text:p text:style-name="P13">Informational</text:p>
          </table:table-cell>
        </table:table-row>
        <table:table-row table:style-name="Table5.1">
          <table:table-cell table:style-name="Table5.A1" office:value-type="string">
            <text:p text:style-name="P13">DOGE</text:p>
          </table:table-cell>
          <table:table-cell table:style-name="Table5.A1" office:value-type="string">
            <text:p text:style-name="P13">general</text:p>
          </table:table-cell>
          <table:table-cell table:style-name="Table5.A1" office:value-type="string">
            <text:p text:style-name="P13">40</text:p>
          </table:table-cell>
          <table:table-cell table:style-name="Table5.A1" office:value-type="string">
            <text:p text:style-name="P13">Informational</text:p>
          </table:table-cell>
        </table:table-row>
      </table:table>
      <text:h text:style-name="P4" text:outline-level="2">3.4 REST API</text:h>
      <text:p text:style-name="P10">Система надає 8 REST-ендпоінтів для взаємодії з Dashboard та зовнішніми системами: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12">Метод</text:p>
          </table:table-cell>
          <table:table-cell table:style-name="Table6.A1" office:value-type="string">
            <text:p text:style-name="P12">Шлях</text:p>
          </table:table-cell>
          <table:table-cell table:style-name="Table6.A1" office:value-type="string">
            <text:p text:style-name="P12">Опис</text:p>
          </table:table-cell>
        </table:table-row>
        <text:soft-page-break/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</text:p>
          </table:table-cell>
          <table:table-cell table:style-name="Table6.A1" office:value-type="string">
            <text:p text:style-name="P13">Dashboard (HTML)</text:p>
          </table:table-cell>
        </table:table-row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conf</text:p>
          </table:table-cell>
          <table:table-cell table:style-name="Table6.A1" office:value-type="string">
            <text:p text:style-name="P13">Сторінка конфігурації (HTML)</text:p>
          </table:table-cell>
        </table:table-row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api/status</text:p>
          </table:table-cell>
          <table:table-cell table:style-name="Table6.A1" office:value-type="string">
            <text:p text:style-name="P13">Стан потоків, uptime</text:p>
          </table:table-cell>
        </table:table-row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api/http-changes</text:p>
          </table:table-cell>
          <table:table-cell table:style-name="Table6.A1" office:value-type="string">
            <text:p text:style-name="P13">Останні HTTP-снапшоти</text:p>
          </table:table-cell>
        </table:table-row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api/nntp-feed</text:p>
          </table:table-cell>
          <table:table-cell table:style-name="Table6.A1" office:value-type="string">
            <text:p text:style-name="P13">Останні NNTP-статті</text:p>
          </table:table-cell>
        </table:table-row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api/alerts</text:p>
          </table:table-cell>
          <table:table-cell table:style-name="Table6.A1" office:value-type="string">
            <text:p text:style-name="P13">Ринкові сигнали</text:p>
          </table:table-cell>
        </table:table-row>
        <table:table-row table:style-name="Table6.1">
          <table:table-cell table:style-name="Table6.A1" office:value-type="string">
            <text:p text:style-name="P13">GET</text:p>
          </table:table-cell>
          <table:table-cell table:style-name="Table6.A1" office:value-type="string">
            <text:p text:style-name="P13">/api/config</text:p>
          </table:table-cell>
          <table:table-cell table:style-name="Table6.A1" office:value-type="string">
            <text:p text:style-name="P13">Поточна конфігурація</text:p>
          </table:table-cell>
        </table:table-row>
        <table:table-row table:style-name="Table6.1">
          <table:table-cell table:style-name="Table6.A1" office:value-type="string">
            <text:p text:style-name="P13">POST</text:p>
          </table:table-cell>
          <table:table-cell table:style-name="Table6.A1" office:value-type="string">
            <text:p text:style-name="P13">/api/config</text:p>
          </table:table-cell>
          <table:table-cell table:style-name="Table6.A1" office:value-type="string">
            <text:p text:style-name="P13">Оновлення конфігурації</text:p>
          </table:table-cell>
        </table:table-row>
      </table:table>
      <text:h text:style-name="P3" text:outline-level="1">4. Висновки</text:h>
      <text:list text:continue-numbering="true" text:style-name="WWNum1">
        <text:list-item>
          <text:p text:style-name="P5"><text:span text:style-name="T2">Сокетне програмування: </text:span><text:span text:style-name="T1">реалізовано повноцінні клієнти HTTP та NNTP протоколів через сирі TCP-сокети без використання бібліотек urllib чи requests, що демонструє глибоке розуміння мережевих протоколів на рівні байтових потоків.</text:span></text:p>
        </text:list-item>
        <text:list-item>
          <text:p text:style-name="P5"><text:span text:style-name="T2">Багатопотоковість: </text:span><text:span text:style-name="T1">система використовує 3 daemon-потоки з event-driven комунікацією (threading.Event) та потокобезпечним доступом до SQLite через WAL-режим, що забезпечує паралельну обробку даних з різних джерел.</text:span></text:p>
        </text:list-item>
        <text:list-item>
          <text:p text:style-name="P5"><text:span text:style-name="T2">Кореляційний аналіз: </text:span><text:span text:style-name="T1">інтегральний показник впевненості (0–100) дозволяє класифікувати ринкові події за пріоритетом та надавати конкретні рекомендації для прийняття рішень.</text:span></text:p>
        </text:list-item>
        <text:list-item>
          <text:p text:style-name="P5"><text:span text:style-name="T2">Graceful degradation: </text:span><text:span text:style-name="T1">система коректно обробляє недоступність серверів — продовжує роботу з логуванням помилок, без аварійного завершення, що є критичним для систем реального часу.</text:span></text:p>
        </text:list-item>
        <text:list-item>
          <text:p text:style-name="P5"><text:span text:style-name="T2">Практичність: </text:span><text:span text:style-name="T1">веб-інтерфейс з авто-оновленням, browser notifications для високопріоритетних подій, та гнучка конфігурація через UI роблять систему придатною для реального моніторингу криптовалютних ринків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499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2-07T16:48:57.412891082</dc:date>
    <meta:editing-duration>PT46S</meta:editing-duration>
    <meta:generator>LibreOffice/24.2.7.2$Linux_X86_64 LibreOffice_project/420$Build-2</meta:generator>
    <meta:document-statistic meta:table-count="6" meta:image-count="2" meta:object-count="0" meta:page-count="7" meta:paragraph-count="156" meta:word-count="826" meta:character-count="6716" meta:non-whitespace-character-count="6049"/>
    <meta:user-defined meta:name="AppVersion">14.0000</meta:user-defined>
    <meta:template xlink:type="simple" xlink:actuate="onRequest" xlink:title="Normal.dotm" xlink:href=""/>
  </office:meta>
</office:document-meta>
</file>