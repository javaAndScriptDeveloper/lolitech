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80000038427D2B008.png" manifest:media-type="image/png"/>
  <manifest:file-entry manifest:full-path="Pictures/1000000100000708000003844D0AD6C3.png" manifest:media-type="image/png"/>
  <manifest:file-entry manifest:full-path="Pictures/1000000100000708000003840D3388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7.59cm" fo:margin-top="0cm" fo:margin-bottom="0cm" table:align="center" style:writing-mode="lr-tb"/>
    </style:style>
    <style:style style:name="Table1.A" style:family="table-column">
      <style:table-column-properties style:column-width="5.86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59cm" fo:margin-top="0cm" fo:margin-bottom="0cm" table:align="center" style:writing-mode="lr-tb"/>
    </style:style>
    <style:style style:name="Table2.A" style:family="table-column">
      <style:table-column-properties style:column-width="5.86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595cm" fo:margin-top="0cm" fo:margin-bottom="0cm" table:align="center" style:writing-mode="lr-tb"/>
    </style:style>
    <style:style style:name="Table3.A" style:family="table-column">
      <style:table-column-properties style:column-width="3.51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 fo:break-before="page"/>
    </style:style>
    <style:style style:name="P3" style:family="paragraph" style:parent-style-name="Heading_20_1">
      <style:text-properties fo:color="#000000" loext:opacity="100%" style:font-name="Times New Roman"/>
    </style:style>
    <style:style style:name="P4" style:family="paragraph" style:parent-style-name="Heading_20_2">
      <style:text-properties fo:color="#000000" loext:opacity="100%" style:font-name="Times New Roman"/>
    </style:style>
    <style:style style:name="P5" style:family="paragraph" style:parent-style-name="List_20_1" style:list-style-name="WWNum1"/>
    <style:style style:name="P6" style:family="paragraph" style:parent-style-name="Standard">
      <style:paragraph-properties fo:text-align="center" style:justify-single-word="false"/>
      <style:text-properties style:font-name="Times New Roman" fo:font-size="26pt" fo:font-weight="bold" style:font-size-asian="26pt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style:font-size-asian="16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/>
    </style:style>
    <style:style style:name="P10" style:family="paragraph" style:parent-style-name="Standard">
      <style:text-properties style:font-name="Times New Roman" fo:font-size="14pt" fo:font-weight="normal" style:font-size-asian="14pt" style:font-weight-asian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/>
    </style:style>
    <style:style style:name="P12" style:family="paragraph" style:parent-style-name="Standard">
      <style:text-properties style:font-name="Times New Roman" fo:font-size="14pt" fo:font-weight="normal" officeooo:rsid="001056cd" officeooo:paragraph-rsid="001056cd" style:font-size-asian="14pt" style:font-weight-asian="normal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n" fo:country="US" fo:font-weight="bold" style:letter-kerning="false" style:font-name-asian="ＭＳ 明朝" style:font-size-asian="12pt" style:language-asian="en" style:country-asian="US" style:font-weight-asian="bold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n" fo:country="US" style:letter-kerning="false" style:font-name-asian="ＭＳ 明朝" style:font-size-asian="12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fo:font-weight="bold" style:font-size-asian="14pt" style:font-weight-asian="bold"/>
    </style:style>
    <style:style style:name="T3" style:family="text">
      <style:text-properties style:font-name="Times New Roman" fo:font-size="14pt" fo:font-weight="normal" style:font-size-asian="14pt" style:font-weight-asian="normal"/>
    </style:style>
    <style:style style:name="T4" style:family="text">
      <style:text-properties style:font-name="Times New Roman" fo:font-size="12pt" fo:font-weight="bold" style:font-size-asian="12pt" style:font-weight-asian="bold"/>
    </style:style>
    <style:style style:name="T5" style:family="text">
      <style:text-properties style:font-name="Times New Roman" fo:font-size="12pt" style:font-size-asian="12pt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6">Лабораторна Робота №2</text:p>
      <text:p text:style-name="P7">з предмету "СУЧАСНІ КОНЦЕПЦІЇ<text:line-break/>СТВОРЕННЯ<text:line-break/>ІНТЕЛЕКТУАЛЬНИХ<text:line-break/>ІНФОРМАЦІЙНИХ СИСТЕМ"</text:p>
      <text:p text:style-name="Standard"/>
      <text:p text:style-name="Standard"/>
      <text:p text:style-name="Standard"/>
      <text:p text:style-name="Standard"/>
      <text:p text:style-name="P8">Виконав<text:line-break/>аспірант групи IT-з41Ф<text:line-break/>Фещенко Кири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Київ 2026</text:p>
      <text:p text:style-name="Standard"/>
      <text:p text:style-name="P2"><text:span text:style-name="T2">Тема: </text:span><text:span text:style-name="T1">Моделювання штучного життя: еволюція харчового ланцюга з нейромережевим керуванням агентів</text:span></text:p>
      <text:h text:style-name="P3" text:outline-level="1">1. Вступ та постановка задачі</text:h>
      <text:h text:style-name="P4" text:outline-level="2">1.1 Мета роботи</text:h>
      <text:p text:style-name="P10">Метою даної лабораторної роботи є моделювання штучної екосистеми з трирівневим харчовим ланцюгом (рослини → травоїдні → хижаки), де поведінка агентів контролюється нейронними мережами, а еволюція відбувається через природний добір та мутацію нейромережевих ваг. Робота демонструє принципи емерджентної поведінки, еволюційних алгоритмів та агентного моделювання.</text:p>
      <text:h text:style-name="P4" text:outline-level="2">1.2 Теоретичні відомості</text:h>
      <text:p text:style-name="Standard"><text:span text:style-name="T2">Штучне життя (Artificial Life)</text:span><text:span text:style-name="T3"> — міждисциплінарна область, що вивчає створення та моделювання живих систем у комп'ютерному середовищі. Базується на ідеї, що складна поведінка може виникати з простих правил (емерджентність).</text:span></text:p>
      <text:p text:style-name="Standard"><text:span text:style-name="T2">Нейронна мережа агента</text:span><text:span text:style-name="T3"> — одношарова мережа з 12 входами (сенсори: 3 типи об'єктів × 4 напрямки) та 4 виходами (дії: поворот ліворуч, поворот праворуч, рух вперед, їсти). Обчислення виходу: o_j = b_j + Σ(u_i × w_ij), де w_ij — ваги, b_j — зміщення. Вибір дії за принципом winner-takes-all (argmax).</text:span></text:p>
      <text:p text:style-name="Standard"><text:span text:style-name="T2">Еволюційний механізм</text:span><text:span text:style-name="T3"> — агенти з достатньою енергією (≥50% від максимуму) розмножуються, передаючи нащадкам мутовані копії нейромережевих ваг. Мутація додає випадкове відхилення ±0.1 до ваг та ±0.05 до зміщень. Природний добір відбувається через загибель агентів з нульовою енергією.</text:span></text:p>
      <text:h text:style-name="P4" text:outline-level="2">1.3 Математична модель</text:h>
      <text:p text:style-name="P10">Обчислення виходів нейронної мережі агента:</text:p>
      <text:p text:style-name="P11">o_j = b_j + Σ(u_i × w_ij), <text:s/>j = 1..4</text:p>
      <text:p text:style-name="P10">де u_i — вхідний сигнал i-го сенсора, w_ij — вага зв'язку, b_j — зміщення виходу j.</text:p>
      <text:p text:style-name="P10">Вибір дії: a* = argmax_j(o_j)</text:p>
      <text:p text:style-name="P10">Мутація при розмноженні:</text:p>
      <text:p text:style-name="P11">w'_ij = w_ij + U(-0.1, +0.1), <text:s/>b'_j = b_j + U(-0.05, +0.05)</text:p>
      <text:h text:style-name="P3" text:outline-level="1"><text:soft-page-break/>2. Опис реалізації</text:h>
      <text:h text:style-name="P4" text:outline-level="2">2.1 Архітектура системи</text:h>
      <text:p text:style-name="P10">Система складається з п'яти модулів, реалізованих мовою Python з використанням бібліотек NumPy (обчислення нейромереж), Pygame (візуалізація) та Matplotlib (статистичні графіки).</text:p>
      <text:p text:style-name="P12"><text:span text:style-name="T6">Код</text:span> → <text:a xlink:type="simple" xlink:href="https://github.com/javaAndScriptDeveloper/agentic_algorithms/tree/master/labSecond" text:style-name="Internet_20_link" text:visited-style-name="Visited_20_Internet_20_Link">https://github.com/javaAndScriptDeveloper/agentic_algorithms/tree/master/labSecond</text:a></text:p>
      <text:h text:style-name="P4" text:outline-level="2">2.2 Структура проекту</text:h>
      <text:list text:style-name="WWNum1">
        <text:list-item>
          <text:p text:style-name="P5"><text:span text:style-name="T4">main.py</text:span><text:span text:style-name="T5"> — головний модуль, точка входу з двома режимами (візуальний/headless)</text:span></text:p>
        </text:list-item>
        <text:list-item>
          <text:p text:style-name="P5"><text:span text:style-name="T4">world.py</text:span><text:span text:style-name="T5"> — ігровий світ, просторове хешування, цикл симуляції</text:span></text:p>
        </text:list-item>
        <text:list-item>
          <text:p text:style-name="P5"><text:span text:style-name="T4">agent.py</text:span><text:span text:style-name="T5"> — класи Plant, Herbivore, Carnivore з нейромережевою логікою</text:span></text:p>
        </text:list-item>
        <text:list-item>
          <text:p text:style-name="P5"><text:span text:style-name="T4">config.py</text:span><text:span text:style-name="T5"> — параметри симуляції (популяція, енергія, мутація, візуалізація)</text:span></text:p>
        </text:list-item>
        <text:list-item>
          <text:p text:style-name="P5"><text:span text:style-name="T4">statistics.py</text:span><text:span text:style-name="T5"> — збір даних, генерація графіків та CSV-звітів</text:span></text:p>
        </text:list-item>
        <text:list-item>
          <text:p text:style-name="P5"><text:span text:style-name="T4">visualizer.py</text:span><text:span text:style-name="T5"> — Pygame-візуалізатор реального часу з інтерактивним керуванням</text:span></text:p>
        </text:list-item>
      </text:list>
      <text:h text:style-name="P4" text:outline-level="2">2.3 Нейронна мережа агента</text:h>
      <text:p text:style-name="P10">Кожен мобільний агент (травоїдний або хижак) має одношарову нейронну мережу з 12 входами та 4 виходами. Входи кодують наявність трьох типів об'єктів (травоїдні, хижаки, рослини) у чотирьох напрямках (спереду, зліва, справа, поблизу). Виходи відповідають діям: поворот ліворуч, поворот праворуч, рух вперед, їсти.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3">Параметр</text:p>
          </table:table-cell>
          <table:table-cell table:style-name="Table1.A1" office:value-type="string">
            <text:p text:style-name="P13">Опис</text:p>
          </table:table-cell>
          <table:table-cell table:style-name="Table1.A1" office:value-type="string">
            <text:p text:style-name="P13">Значення</text:p>
          </table:table-cell>
        </table:table-row>
        <table:table-row table:style-name="Table1.1">
          <table:table-cell table:style-name="Table1.A1" office:value-type="string">
            <text:p text:style-name="P14">Входи (u_i)</text:p>
          </table:table-cell>
          <table:table-cell table:style-name="Table1.A1" office:value-type="string">
            <text:p text:style-name="P14">Сенсори: 3 типи × 4 напрямки</text:p>
          </table:table-cell>
          <table:table-cell table:style-name="Table1.A1" office:value-type="string">
            <text:p text:style-name="P14">12</text:p>
          </table:table-cell>
        </table:table-row>
        <table:table-row table:style-name="Table1.1">
          <table:table-cell table:style-name="Table1.A1" office:value-type="string">
            <text:p text:style-name="P14">Виходи (o_j)</text:p>
          </table:table-cell>
          <table:table-cell table:style-name="Table1.A1" office:value-type="string">
            <text:p text:style-name="P14">Дії: left, right, move, eat</text:p>
          </table:table-cell>
          <table:table-cell table:style-name="Table1.A1" office:value-type="string">
            <text:p text:style-name="P14">4</text:p>
          </table:table-cell>
        </table:table-row>
        <table:table-row table:style-name="Table1.1">
          <table:table-cell table:style-name="Table1.A1" office:value-type="string">
            <text:p text:style-name="P14">Ваги (w_ij)</text:p>
          </table:table-cell>
          <table:table-cell table:style-name="Table1.A1" office:value-type="string">
            <text:p text:style-name="P14">Матриця зв'язків 12×4</text:p>
          </table:table-cell>
          <table:table-cell table:style-name="Table1.A1" office:value-type="string">
            <text:p text:style-name="P14">48</text:p>
          </table:table-cell>
        </table:table-row>
        <table:table-row table:style-name="Table1.1">
          <table:table-cell table:style-name="Table1.A1" office:value-type="string">
            <text:p text:style-name="P14">Зміщення (b_j)</text:p>
          </table:table-cell>
          <table:table-cell table:style-name="Table1.A1" office:value-type="string">
            <text:p text:style-name="P14">Біас кожного виходу</text:p>
          </table:table-cell>
          <table:table-cell table:style-name="Table1.A1" office:value-type="string">
            <text:p text:style-name="P14">4</text:p>
          </table:table-cell>
        </table:table-row>
      </table:table>
      <text:p text:style-name="P10">Ініціалізація ваг включає вроджені поведінкові паттерни: травоїдні мають підсилений зв'язок між сенсором рослин та дією їсти/рухатись, а також негативний зв'язок між сенсором хижаків та рухом вперед (уникнення). Це забезпечує базову виживаність першого покоління.</text:p>
      <text:h text:style-name="P4" text:outline-level="2">2.4 Просторова оптимізація</text:h>
      <text:p text:style-name="P10">Для ефективного пошуку сусідів у великому світі (800×800 клітин) реалізовано просторове хешування (spatial hashing). Світ поділяється на комірки розміром 15×15 (відповідно до VISION_RANGE), що зводить складність пошуку сусідів від O(n²) до O(n×k), де k — середня кількість агентів у комірці.</text:p>
      <text:h text:style-name="P4" text:outline-level="2"><text:soft-page-break/>2.5 Параметри симуляції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3">Параметр</text:p>
          </table:table-cell>
          <table:table-cell table:style-name="Table2.A1" office:value-type="string">
            <text:p text:style-name="P13">Опис</text:p>
          </table:table-cell>
          <table:table-cell table:style-name="Table2.A1" office:value-type="string">
            <text:p text:style-name="P13">Значення</text:p>
          </table:table-cell>
        </table:table-row>
        <table:table-row table:style-name="Table2.1">
          <table:table-cell table:style-name="Table2.A1" office:value-type="string">
            <text:p text:style-name="P14">WORLD_SIZE</text:p>
          </table:table-cell>
          <table:table-cell table:style-name="Table2.A1" office:value-type="string">
            <text:p text:style-name="P14">Розмір світу (N×N)</text:p>
          </table:table-cell>
          <table:table-cell table:style-name="Table2.A1" office:value-type="string">
            <text:p text:style-name="P14">800</text:p>
          </table:table-cell>
        </table:table-row>
        <table:table-row table:style-name="Table2.1">
          <table:table-cell table:style-name="Table2.A1" office:value-type="string">
            <text:p text:style-name="P14">INITIAL_PLANTS</text:p>
          </table:table-cell>
          <table:table-cell table:style-name="Table2.A1" office:value-type="string">
            <text:p text:style-name="P14">Початкова кількість рослин</text:p>
          </table:table-cell>
          <table:table-cell table:style-name="Table2.A1" office:value-type="string">
            <text:p text:style-name="P14">15 000</text:p>
          </table:table-cell>
        </table:table-row>
        <table:table-row table:style-name="Table2.1">
          <table:table-cell table:style-name="Table2.A1" office:value-type="string">
            <text:p text:style-name="P14">INITIAL_HERBIVORES</text:p>
          </table:table-cell>
          <table:table-cell table:style-name="Table2.A1" office:value-type="string">
            <text:p text:style-name="P14">Початкова кількість травоїдних</text:p>
          </table:table-cell>
          <table:table-cell table:style-name="Table2.A1" office:value-type="string">
            <text:p text:style-name="P14">3 000</text:p>
          </table:table-cell>
        </table:table-row>
        <table:table-row table:style-name="Table2.1">
          <table:table-cell table:style-name="Table2.A1" office:value-type="string">
            <text:p text:style-name="P14">INITIAL_CARNIVORES</text:p>
          </table:table-cell>
          <table:table-cell table:style-name="Table2.A1" office:value-type="string">
            <text:p text:style-name="P14">Початкова кількість хижаків</text:p>
          </table:table-cell>
          <table:table-cell table:style-name="Table2.A1" office:value-type="string">
            <text:p text:style-name="P14">10</text:p>
          </table:table-cell>
        </table:table-row>
        <table:table-row table:style-name="Table2.1">
          <table:table-cell table:style-name="Table2.A1" office:value-type="string">
            <text:p text:style-name="P14">PLANT_ENERGY</text:p>
          </table:table-cell>
          <table:table-cell table:style-name="Table2.A1" office:value-type="string">
            <text:p text:style-name="P14">Енергія від рослини</text:p>
          </table:table-cell>
          <table:table-cell table:style-name="Table2.A1" office:value-type="string">
            <text:p text:style-name="P14">35</text:p>
          </table:table-cell>
        </table:table-row>
        <table:table-row table:style-name="Table2.1">
          <table:table-cell table:style-name="Table2.A1" office:value-type="string">
            <text:p text:style-name="P14">HERBIVORE_ENERGY</text:p>
          </table:table-cell>
          <table:table-cell table:style-name="Table2.A1" office:value-type="string">
            <text:p text:style-name="P14">Енергія від травоїдного</text:p>
          </table:table-cell>
          <table:table-cell table:style-name="Table2.A1" office:value-type="string">
            <text:p text:style-name="P14">100</text:p>
          </table:table-cell>
        </table:table-row>
        <table:table-row table:style-name="Table2.1">
          <table:table-cell table:style-name="Table2.A1" office:value-type="string">
            <text:p text:style-name="P14">REPRODUCTION_THRESHOLD</text:p>
          </table:table-cell>
          <table:table-cell table:style-name="Table2.A1" office:value-type="string">
            <text:p text:style-name="P14">Поріг розмноження</text:p>
          </table:table-cell>
          <table:table-cell table:style-name="Table2.A1" office:value-type="string">
            <text:p text:style-name="P14">50 (50% від max)</text:p>
          </table:table-cell>
        </table:table-row>
        <table:table-row table:style-name="Table2.1">
          <table:table-cell table:style-name="Table2.A1" office:value-type="string">
            <text:p text:style-name="P14">VISION_RANGE</text:p>
          </table:table-cell>
          <table:table-cell table:style-name="Table2.A1" office:value-type="string">
            <text:p text:style-name="P14">Дальність зору агента</text:p>
          </table:table-cell>
          <table:table-cell table:style-name="Table2.A1" office:value-type="string">
            <text:p text:style-name="P14">15</text:p>
          </table:table-cell>
        </table:table-row>
        <table:table-row table:style-name="Table2.1">
          <table:table-cell table:style-name="Table2.A1" office:value-type="string">
            <text:p text:style-name="P14">EAT_RANGE</text:p>
          </table:table-cell>
          <table:table-cell table:style-name="Table2.A1" office:value-type="string">
            <text:p text:style-name="P14">Дальність поїдання</text:p>
          </table:table-cell>
          <table:table-cell table:style-name="Table2.A1" office:value-type="string">
            <text:p text:style-name="P14">3</text:p>
          </table:table-cell>
        </table:table-row>
        <table:table-row table:style-name="Table2.1">
          <table:table-cell table:style-name="Table2.A1" office:value-type="string">
            <text:p text:style-name="P14">MAX_ITERATIONS</text:p>
          </table:table-cell>
          <table:table-cell table:style-name="Table2.A1" office:value-type="string">
            <text:p text:style-name="P14">Максимум ітерацій</text:p>
          </table:table-cell>
          <table:table-cell table:style-name="Table2.A1" office:value-type="string">
            <text:p text:style-name="P14">5 000</text:p>
          </table:table-cell>
        </table:table-row>
      </table:table>
      <text:h text:style-name="P3" text:outline-level="1">3. Результати експериментів</text:h>
      <text:h text:style-name="P4" text:outline-level="2">3.1 Динаміка популяцій</text:h>
      <text:p text:style-name="P10">Графік демонструє класичну динаміку хижак-жертва. Початковий спад популяції травоїдних (з 3000 до ~2400 на 30-й ітерації) пов'язаний з адаптацією — агенти першого покоління ще не мають оптимальних ваг для пошуку їжі. Після адаптивного періоду популяція стабілізується на рівні 6000–9000 особин з характерними осциляціями, спричиненими конкуренцією за ресурси.</text:p>
      <text:p text:style-name="P1"><draw:frame draw:style-name="fr1" draw:name="Picture 1" text:anchor-type="as-char" svg:width="16cm" svg:height="7.999cm" draw:z-index="0"><draw:image xlink:href="Pictures/1000000100000708000003840D338844.png" xlink:type="simple" xlink:show="embed" xlink:actuate="onLoad" draw:mime-type="image/png"/></draw:frame></text:p>
      <text:p text:style-name="P15">Рис. 1. Динаміка популяцій протягом симуляції</text:p>
      <text:h text:style-name="P4" text:outline-level="2"><text:soft-page-break/>3.2 Рівні енергії</text:h>
      <text:p text:style-name="P10">Середній рівень енергії травоїдних зростає з ~30 до ~77 одиниць за 300 ітерацій, що свідчить про еволюційне покращення навичок пошуку їжі. Хижаки демонструють більш волатильний профіль енергії (20–75), що пояснюється залежністю від успішності полювання та меншим розміром популяції.</text:p>
      <text:p text:style-name="P1"><draw:frame draw:style-name="fr1" draw:name="Picture 2" text:anchor-type="as-char" svg:width="16cm" svg:height="7.999cm" draw:z-index="1"><draw:image xlink:href="Pictures/1000000100000708000003844D0AD6C3.png" xlink:type="simple" xlink:show="embed" xlink:actuate="onLoad" draw:mime-type="image/png"/></draw:frame></text:p>
      <text:p text:style-name="P15">Рис. 2. Середні рівні енергії агентів</text:p>
      <text:h text:style-name="P4" text:outline-level="2">3.3 Еволюція поколінь</text:h>
      <text:p text:style-name="P10">Середнє покоління травоїдних зростає швидше (до 8 за 300 ітерацій) ніж хижаків (до 5–6), що пояснюється вищим темпом розмноження та більшою популяцією. Прискорене зростання покоління після 50-ї ітерації відповідає моменту еволюційного прориву — виникненню ефективних стратегій пошуку їжі.</text:p>
      <text:p text:style-name="P1"><text:soft-page-break/><draw:frame draw:style-name="fr1" draw:name="Picture 3" text:anchor-type="as-char" svg:width="16cm" svg:height="7.999cm" draw:z-index="2"><draw:image xlink:href="Pictures/10000001000007080000038427D2B008.png" xlink:type="simple" xlink:show="embed" xlink:actuate="onLoad" draw:mime-type="image/png"/></draw:frame></text:p>
      <text:p text:style-name="P15">Рис. 3. Еволюція: середнє покоління агентів з часом</text:p>
      <text:h text:style-name="P4" text:outline-level="2">3.4 Підсумкова статистика</text:h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13">Вид</text:p>
          </table:table-cell>
          <table:table-cell table:style-name="Table3.A1" office:value-type="string">
            <text:p text:style-name="P13">Популяція (min–max)</text:p>
          </table:table-cell>
          <table:table-cell table:style-name="Table3.A1" office:value-type="string">
            <text:p text:style-name="P13">Сер. вік</text:p>
          </table:table-cell>
          <table:table-cell table:style-name="Table3.A1" office:value-type="string">
            <text:p text:style-name="P13">Макс. покоління</text:p>
          </table:table-cell>
          <table:table-cell table:style-name="Table3.A1" office:value-type="string">
            <text:p text:style-name="P13">Сер. енергія</text:p>
          </table:table-cell>
        </table:table-row>
        <table:table-row table:style-name="Table3.1">
          <table:table-cell table:style-name="Table3.A1" office:value-type="string">
            <text:p text:style-name="P14">Рослини</text:p>
          </table:table-cell>
          <table:table-cell table:style-name="Table3.A1" office:value-type="string">
            <text:p text:style-name="P14">15 000 (стабільно)</text:p>
          </table:table-cell>
          <table:table-cell table:style-name="Table3.A1" office:value-type="string">
            <text:p text:style-name="P14">—</text:p>
          </table:table-cell>
          <table:table-cell table:style-name="Table3.A1" office:value-type="string">
            <text:p text:style-name="P14">—</text:p>
          </table:table-cell>
          <table:table-cell table:style-name="Table3.A1" office:value-type="string">
            <text:p text:style-name="P14">—</text:p>
          </table:table-cell>
        </table:table-row>
        <table:table-row table:style-name="Table3.1">
          <table:table-cell table:style-name="Table3.A1" office:value-type="string">
            <text:p text:style-name="P14">Травоїдні</text:p>
          </table:table-cell>
          <table:table-cell table:style-name="Table3.A1" office:value-type="string">
            <text:p text:style-name="P14">2 733 – 6 525</text:p>
          </table:table-cell>
          <table:table-cell table:style-name="Table3.A1" office:value-type="string">
            <text:p text:style-name="P14">29.1</text:p>
          </table:table-cell>
          <table:table-cell table:style-name="Table3.A1" office:value-type="string">
            <text:p text:style-name="P14">13</text:p>
          </table:table-cell>
          <table:table-cell table:style-name="Table3.A1" office:value-type="string">
            <text:p text:style-name="P14">23.0</text:p>
          </table:table-cell>
        </table:table-row>
        <table:table-row table:style-name="Table3.1">
          <table:table-cell table:style-name="Table3.A1" office:value-type="string">
            <text:p text:style-name="P14">Хижаки</text:p>
          </table:table-cell>
          <table:table-cell table:style-name="Table3.A1" office:value-type="string">
            <text:p text:style-name="P14">5 – 20</text:p>
          </table:table-cell>
          <table:table-cell table:style-name="Table3.A1" office:value-type="string">
            <text:p text:style-name="P14">44.8</text:p>
          </table:table-cell>
          <table:table-cell table:style-name="Table3.A1" office:value-type="string">
            <text:p text:style-name="P14">5</text:p>
          </table:table-cell>
          <table:table-cell table:style-name="Table3.A1" office:value-type="string">
            <text:p text:style-name="P14">33.0</text:p>
          </table:table-cell>
        </table:table-row>
      </table:table>
      <text:h text:style-name="P3" text:outline-level="1">4. Висновки</text:h>
      <text:list text:continue-numbering="true" text:style-name="WWNum1">
        <text:list-item>
          <text:p text:style-name="P5"><text:span text:style-name="T2">Емерджентна поведінка: </text:span><text:span text:style-name="T1">система демонструє виникнення складних поведінкових стратегій (пошук їжі, уникнення хижаків) з простих нейромережевих правил через еволюційний процес мутації та природного добору.</text:span></text:p>
        </text:list-item>
        <text:list-item>
          <text:p text:style-name="P5"><text:span text:style-name="T2">Еволюційна динаміка: </text:span><text:span text:style-name="T1">травоїдні еволюціонують значно швидше за хижаків (покоління 8 vs 5), що відповідає біологічному принципу — більші популяції мають вищий еволюційний потенціал за рахунок більшого генетичного різноманіття.</text:span></text:p>
        </text:list-item>
        <text:list-item>
          <text:p text:style-name="P5"><text:span text:style-name="T2">Трофічна піраміда: </text:span><text:span text:style-name="T1">співвідношення популяцій (15000:3000:10) відтворює реалістичну екологічну піраміду, де кожен наступний трофічний рівень має значно меншу чисельність.</text:span></text:p>
        </text:list-item>
        <text:list-item>
          <text:p text:style-name="P5"><text:span text:style-name="T2">Стабільність екосистеми: </text:span><text:span text:style-name="T1">система досягає динамічної рівноваги з характерними осциляціями популяцій, аналогічними моделі Лотки-Вольтерра, що підтверджує біологічну достовірність моделі.</text:span></text:p>
        </text:list-item>
        <text:list-item>
          <text:p text:style-name="P5"><text:soft-page-break/><text:span text:style-name="T2">Практичне значення: </text:span><text:span text:style-name="T1">розроблена система може використовуватись для дослідження еволюційних стратегій, тестування різних конфігурацій нейромереж та вивчення екологічних моделей у контрольованому середовищі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499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2-07T16:47:26.752267570</dc:date>
    <meta:editing-duration>PT1M11S</meta:editing-duration>
    <meta:generator>LibreOffice/24.2.7.2$Linux_X86_64 LibreOffice_project/420$Build-2</meta:generator>
    <meta:document-statistic meta:table-count="3" meta:image-count="3" meta:object-count="0" meta:page-count="7" meta:paragraph-count="124" meta:word-count="843" meta:character-count="6373" meta:non-whitespace-character-count="5643"/>
    <meta:user-defined meta:name="AppVersion">14.0000</meta:user-defined>
    <meta:template xlink:type="simple" xlink:actuate="onRequest" xlink:title="Normal.dotm" xlink:href=""/>
  </office:meta>
</office:document-meta>
</file>