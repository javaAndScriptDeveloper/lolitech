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start" style:justify-single-word="false" fo:break-before="page"/>
    </style:style>
    <style:style style:name="P3" style:family="paragraph" style:parent-style-name="Standard">
      <style:paragraph-properties fo:margin-top="0.423cm" fo:margin-bottom="0.212cm" style:contextual-spacing="false" fo:text-align="start" style:justify-single-word="false"/>
    </style:style>
    <style:style style:name="P4" style:family="paragraph" style:parent-style-name="Standard">
      <style:paragraph-properties fo:margin-top="0cm" fo:margin-bottom="0.212cm" style:contextual-spacing="false" fo:text-align="justify" style:justify-single-word="false" fo:text-indent="1.251cm" style:auto-text-indent="false"/>
    </style:style>
    <style:style style:name="P5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6" style:family="paragraph" style:parent-style-name="Standard">
      <style:paragraph-properties fo:margin-left="1.251cm" fo:margin-top="0.141cm" fo:margin-bottom="0.141cm" style:contextual-spacing="false"/>
    </style:style>
    <style:style style:name="T1" style:family="text">
      <style:text-properties style:font-name="Times New Roman" fo:font-size="14pt" fo:font-weight="normal" style:font-size-asian="14pt" style:font-weight-asian="normal"/>
    </style:style>
    <style:style style:name="T2" style:family="text">
      <style:text-properties style:font-name="Times New Roman" fo:font-size="14pt" fo:font-weight="bold" style:font-size-asian="14pt" style:font-weight-asian="bold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Courier New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Національний технічний університет України</text:span></text:p>
      <text:p text:style-name="P1"><text:span text:style-name="T1">«Київський політехнічний інститут імені Ігоря Сікорського»</text:span></text:p>
      <text:p text:style-name="Standard"/>
      <text:p text:style-name="Standard"/>
      <text:p text:style-name="P1"><text:span text:style-name="T3">ЗВІТ</text:span></text:p>
      <text:p text:style-name="P1"><text:span text:style-name="T3">з лабораторної роботи №1</text:span></text:p>
      <text:p text:style-name="Standard"/>
      <text:p text:style-name="P1"><text:span text:style-name="T2">Тема: Технології віддаленого виклику процедур – gRPC</text:span></text:p>
      <text:p text:style-name="Standard"/>
      <text:p text:style-name="P1"><text:span text:style-name="T1">Варіант 17</text:span></text:p>
      <text:p text:style-name="Standard"/>
      <text:p text:style-name="Standard"/>
      <text:p text:style-name="Standard"/>
      <text:p text:style-name="P1"><text:span text:style-name="T1">Київ – 2025</text:span></text:p>
      <text:p text:style-name="Standard"/>
      <text:p text:style-name="P2"><text:span text:style-name="T2">1. Тема роботи</text:span></text:p>
      <text:p text:style-name="P4"><text:span text:style-name="T1">Технології віддаленого виклику процедур – gRPC. Розробка клієнт-серверної програми з використанням gRPC server-side streaming.</text:span></text:p>
      <text:p text:style-name="P3"><text:span text:style-name="T2">2. Мета роботи</text:span></text:p>
      <text:p text:style-name="P4"><text:span text:style-name="T1">Ознайомитися з фреймворком gRPC та форматом серіалізації Protocol Buffers. Реалізувати сервер, який у визначений момент часу розсилає повідомлення підключеним клієнтам через серверний потік (server-side streaming RPC).</text:span></text:p>
      <text:p text:style-name="P3"><text:span text:style-name="T2">3. Індивідуальне завдання</text:span></text:p>
      <text:p text:style-name="P4"><text:span text:style-name="T1">Варіант 17. Сервер розсилає повідомлення у певний час визначеним клієнтам.</text:span></text:p>
      <text:p text:style-name="P3"><text:span text:style-name="T2">4. Теоретичні відомості</text:span></text:p>
      <text:p text:style-name="P4"><text:span text:style-name="T1">gRPC — відкритий фреймворк від Google для організації міжсервісної взаємодії. Побудований поверх HTTP/2, що надає мультиплексування потоків, стиснення заголовків і двонаправлений зв'язок. Контракт між клієнтом і сервером описується у файлах .proto мовою Protocol Buffers; з них автоматично генерується код для обох сторін.</text:span></text:p>
      <text:p text:style-name="P4"><text:span text:style-name="T1">gRPC підтримує чотири типи RPC: unary (один запит — одна відповідь), server-side streaming (один запит — потік відповідей), client-side streaming та bidirectional streaming. У цій роботі використовується server-side streaming: клієнт підписується одним викликом і отримує повідомлення до закриття потоку.</text:span></text:p>
      <text:p text:style-name="P3"><text:span text:style-name="T2">5. Хід виконання роботи</text:span></text:p>
      <text:p text:style-name="P5"><text:span text:style-name="T2">5.1. Proto-контракт</text:span></text:p>
      <text:p text:style-name="P4"><text:span text:style-name="T1">Файл notification.proto визначає сервіс NotificationService з методом SubscribeMessages, що приймає порожній запит (google.protobuf.Empty) і повертає потік повідомлень типу ScheduledMessage.</text:span></text:p>
      <text:p text:style-name="P6"><text:span text:style-name="T4">service NotificationService {<text:line-break/> <text:s/>rpc SubscribeMessages(google.protobuf.Empty)<text:line-break/> <text:s text:c="5"/>returns (stream ScheduledMessage);<text:line-break/>}<text:line-break/><text:line-break/>message ScheduledMessage {<text:line-break/> <text:s/>string content <text:s text:c="2"/>= 1;<text:line-break/> <text:s/>string timestamp = 2;<text:line-break/>}</text:span></text:p>
      <text:p text:style-name="P5"><text:span text:style-name="T2">5.2. Серверна реалізація</text:span></text:p>
      <text:p text:style-name="P4"><text:span text:style-name="T1">Клас NotificationServiceImpl розширює згенерований NotificationServiceGrpc.NotificationServiceImplBase і перевизначає метод subscribeMessages. Сервер у циклі формує об'єкт ScheduledMessage з поточним часом і текстом повідомлення, передає його в StreamObserver через onNext() і робить паузу між відправками. Цикл завершується викликом onCompleted() при закритті з'єднання.</text:span></text:p>
      <text:p text:style-name="P5"><text:span text:style-name="T2">5.3. Конфігурація Spring Boot</text:span></text:p>
      <text:p text:style-name="P4"><text:span text:style-name="T1">Застосунок побудовано на Spring Boot 4.0 з модулем spring-grpc-spring-boot-starter. gRPC-сервер стартує автоматично разом із контекстом Spring і слухає порт 9090 за замовчуванням. Залежності управляються через Gradle (Kotlin DSL, Java 21).</text:span></text:p>
      <text:p text:style-name="P5"><text:span text:style-name="T2">5.4. Перевірка роботи</text:span></text:p>
      <text:p text:style-name="P4"><text:span text:style-name="T1">Підключення клієнта виконувалось через grpcurl. Після виклику методу SubscribeMessages у консолі фіксувався безперервний потік об'єктів ScheduledMessage з полями content і timestamp. Потік залишається відкритим до від'єднання клієнта.</text:span></text:p>
      <text:p text:style-name="P3"><text:span text:style-name="T2">6. Висновки</text:span></text:p>
      <text:p text:style-name="P4"><text:span text:style-name="T1">У ході виконання лабораторної роботи реалізовано клієнт-серверний застосунок на базі gRPC із використанням серверного потокового передавання. Засвоєно синтаксис мови Protocol Buffers, принцип кодогенерації з .proto-файлів та інтеграцію gRPC з фреймворком Spring Boot. Server-side streaming виявився зручним механізмом для сценаріїв push-сповіщень, де сервер ініціює передачу даних без повторних запитів з боку клієнта.</text:span></text:p>
      <text:p text:style-name="P3"><text:span text:style-name="T2">7. Посилання</text:span></text:p>
      <text:p text:style-name="P5"><text:span text:style-name="T1">Репозиторій з вихідним кодом:<text:line-break/>https://github.com/javaAndScriptDeveloper/lolitech/tree/main/defi/submission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7.2$Linux_X86_64 LibreOffice_project/420$Build-2</meta:generator>
    <meta:document-statistic meta:table-count="0" meta:image-count="0" meta:object-count="0" meta:page-count="2" meta:paragraph-count="30" meta:word-count="376" meta:character-count="3216" meta:non-whitespace-character-count="2849"/>
    <meta:user-defined meta:name="AppVersion">14.0000</meta:user-defined>
    <meta:template xlink:type="simple" xlink:actuate="onRequest" xlink:title="Normal.dotm" xlink:href=""/>
  </office:meta>
</office:document-meta>
</file>