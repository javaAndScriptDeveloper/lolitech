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List_20_1" style:list-style-name="WWNum1"/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cm" fo:margin-bottom="0.212cm" style:contextual-spacing="false" fo:text-align="start" style:justify-single-word="false" fo:break-before="page"/>
    </style:style>
    <style:style style:name="P4" style:family="paragraph" style:parent-style-name="Standard">
      <style:paragraph-properties fo:margin-top="0.423cm" fo:margin-bottom="0.212cm" style:contextual-spacing="false" fo:text-align="start" style:justify-single-word="false"/>
    </style:style>
    <style:style style:name="P5" style:family="paragraph" style:parent-style-name="Standard">
      <style:paragraph-properties fo:margin-top="0cm" fo:margin-bottom="0.212cm" style:contextual-spacing="false" fo:text-align="justify" style:justify-single-word="false" fo:text-indent="1.251cm" style:auto-text-indent="false"/>
    </style:style>
    <style:style style:name="P6" style:family="paragraph" style:parent-style-name="Standard">
      <style:paragraph-properties fo:margin-top="0cm" fo:margin-bottom="0.212cm" style:contextual-spacing="false" fo:text-align="justify" style:justify-single-word="false"/>
    </style:style>
    <style:style style:name="P7" style:family="paragraph" style:parent-style-name="Standard">
      <style:paragraph-properties fo:margin-left="1.251cm" fo:margin-top="0.141cm" fo:margin-bottom="0.141cm" style:contextual-spacing="false"/>
    </style:style>
    <style:style style:name="T1" style:family="text">
      <style:text-properties style:font-name="Times New Roman" fo:font-size="14pt" fo:font-weight="normal" style:font-size-asian="14pt" style:font-weight-asian="normal"/>
    </style:style>
    <style:style style:name="T2" style:family="text">
      <style:text-properties style:font-name="Times New Roman" fo:font-size="14pt" fo:font-weight="bold" style:font-size-asian="14pt" style:font-weight-asian="bold"/>
    </style:style>
    <style:style style:name="T3" style:family="text">
      <style:text-properties style:font-name="Times New Roman" fo:font-size="16pt" fo:font-weight="bold" style:font-size-asian="16pt" style:font-weight-asian="bold"/>
    </style:style>
    <style:style style:name="T4" style:family="text">
      <style:text-properties style:font-name="Courier New" fo:font-size="10pt" fo:font-weight="normal" style:font-size-asian="10pt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<text:span text:style-name="T1">Національний технічний університет України</text:span></text:p>
      <text:p text:style-name="P2"><text:span text:style-name="T1">«Київський політехнічний інститут імені Ігоря Сікорського»</text:span></text:p>
      <text:p text:style-name="Standard"/>
      <text:p text:style-name="Standard"/>
      <text:p text:style-name="P2"><text:span text:style-name="T3">ЗВІТ</text:span></text:p>
      <text:p text:style-name="P2"><text:span text:style-name="T3">з лабораторної роботи №2</text:span></text:p>
      <text:p text:style-name="Standard"/>
      <text:p text:style-name="P2"><text:span text:style-name="T2">Тема: Робота з брокерами повідомлень</text:span></text:p>
      <text:p text:style-name="Standard"/>
      <text:p text:style-name="P2"><text:span text:style-name="T1">Варіант 1</text:span></text:p>
      <text:p text:style-name="Standard"/>
      <text:p text:style-name="Standard"/>
      <text:p text:style-name="Standard"/>
      <text:p text:style-name="P2"><text:span text:style-name="T1">Київ – 2025</text:span></text:p>
      <text:p text:style-name="Standard"/>
      <text:p text:style-name="P3"><text:span text:style-name="T2">1. Тема роботи</text:span></text:p>
      <text:p text:style-name="P5"><text:span text:style-name="T1">Робота з брокерами повідомлень. Розробка розподіленого застосунку з використанням RabbitMQ для асинхронної передачі даних між модулями.</text:span></text:p>
      <text:p text:style-name="P4"><text:span text:style-name="T2">2. Мета роботи</text:span></text:p>
      <text:p text:style-name="P5"><text:span text:style-name="T1">Вивчити принципи роботи брокерів повідомлень на прикладі RabbitMQ. Розробити двомодульний розподілений застосунок, у якому перший модуль приймає запит від клієнта і публікує повідомлення до черги, а другий модуль споживає ці повідомлення та зберігає їх у базі даних.</text:span></text:p>
      <text:p text:style-name="P4"><text:span text:style-name="T2">3. Індивідуальне завдання</text:span></text:p>
      <text:p text:style-name="P5"><text:span text:style-name="T1">Варіант 1 — Оранжерея (Flower).</text:span></text:p>
      <text:p text:style-name="P5"><text:span text:style-name="T1">Предметна область: рослини в оранжереї. Кореневий елемент — Flower. Поля сутності:</text:span></text:p>
      <text:list text:style-name="WWNum1">
        <text:list-item>
          <text:p text:style-name="P1"><text:span text:style-name="T1">Name — назва рослини.</text:span></text:p>
        </text:list-item>
        <text:list-item>
          <text:p text:style-name="P1"><text:span text:style-name="T1">Soil — ґрунт (підзолистий, ґрунтовий, дерново-підзолистий).</text:span></text:p>
        </text:list-item>
        <text:list-item>
          <text:p text:style-name="P1"><text:span text:style-name="T1">Origin — місце походження.</text:span></text:p>
        </text:list-item>
        <text:list-item>
          <text:p text:style-name="P1"><text:span text:style-name="T1">Visual parameters — зовнішні параметри: колір стебла, колір листя, середній розмір.</text:span></text:p>
        </text:list-item>
        <text:list-item>
          <text:p text:style-name="P1"><text:span text:style-name="T1">Growing tips — умови зростання: температура, освітлення, полив.</text:span></text:p>
        </text:list-item>
        <text:list-item>
          <text:p text:style-name="P1"><text:span text:style-name="T1">Multiplying — розмноження: листям, живцями або насінням.</text:span></text:p>
        </text:list-item>
      </text:list>
      <text:p text:style-name="P4"><text:span text:style-name="T2">4. Теоретичні відомості</text:span></text:p>
      <text:p text:style-name="P5"><text:span text:style-name="T1">RabbitMQ — брокер повідомлень, що реалізує протокол AMQP 0-9-1. Виробник (producer) публікує повідомлення до exchange, звідки вони маршрутизуються до черг (queues) згідно з binding key. Споживач (consumer) підписується на чергу і обробляє повідомлення асинхронно. Така архітектура забезпечує розв'язку між модулями та стійкість до тимчасової недоступності споживача.</text:span></text:p>
      <text:p text:style-name="P5"><text:span text:style-name="T1">Spring AMQP надає анотацію @RabbitListener для декларативного опису споживачів та RabbitTemplate для відправки. Конфігурація черги, exchange та binding оголошується через Spring beans типу Queue, DirectExchange і Binding.</text:span></text:p>
      <text:p text:style-name="P4"><text:span text:style-name="T2">5. Архітектура застосунку</text:span></text:p>
      <text:p text:style-name="P5"><text:span text:style-name="T1">Застосунок складається з двох модулів в межах одного Spring Boot проекту, що взаємодіють через RabbitMQ:</text:span></text:p>
      <text:p text:style-name="P6"><text:span text:style-name="T2">Модуль GreenProvider (виробник):</text:span></text:p>
      <text:p text:style-name="P5"><text:span text:style-name="T1">Приймає запит реєстрації квітки через gRPC-інтерфейс (FlowerRegistrationServiceImpl). Серіалізує отриманий об'єкт RegisterFlowerMessage (Protobuf) у JSON за допомогою Jackson і публікує до черги RabbitMQ через RabbitTemplate.</text:span></text:p>
      <text:p text:style-name="P6"><text:span text:style-name="T2">Модуль Greenhouse (споживач):</text:span></text:p>
      <text:p text:style-name="P5"><text:span text:style-name="T1">Підписується на чергу через @RabbitListener (FlowerClientService). Десеріалізує JSON-повідомлення у сутність FlowerEntity та зберігає її у реляційній базі даних через Spring Data JPA. Для розробки і тестування використовується вбудована H2-база.</text:span></text:p>
      <text:p text:style-name="P4"><text:span text:style-name="T2">6. Хід виконання роботи</text:span></text:p>
      <text:p text:style-name="P6"><text:span text:style-name="T2">6.1. Proto-контракт (flower.proto)</text:span></text:p>
      <text:p text:style-name="P7"><text:span text:style-name="T4">message RegisterFlowerMessage {<text:line-break/> <text:s/>string name <text:s text:c="6"/>= 1;<text:line-break/> <text:s/>FlowerSoilType soil = 2;<text:line-break/> <text:s/>string origin <text:s text:c="4"/>= 3;<text:line-break/> <text:s/>VisualParameters visual = 4;<text:line-break/> <text:s/>repeated GrowingTip tips = 5;<text:line-break/> <text:s/>string multiplying = 6;<text:line-break/>}<text:line-break/><text:line-break/>enum FlowerSoilType {<text:line-break/> <text:s/>PODZOLIC = 0;<text:line-break/> <text:s/>GROUND <text:s text:c="2"/>= 1;<text:line-break/> <text:s/>SOD_PODZOLIC = 2;<text:line-break/>}</text:span></text:p>
      <text:p text:style-name="P6"><text:span text:style-name="T2">6.2. Конфігурація RabbitMQ</text:span></text:p>
      <text:p text:style-name="P5"><text:soft-page-break/><text:span text:style-name="T1">Клас RabbitConfiguration оголошує чергу, direct exchange і binding із routing key 'flower.register'. Брокер запускається локально через Docker (образ rabbitmq:3-management) командою з compose.yaml.</text:span></text:p>
      <text:p text:style-name="P7"><text:span text:style-name="T4">docker compose up -d <text:s text:c="2"/># піднімає RabbitMQ на localhost:5672</text:span></text:p>
      <text:p text:style-name="P6"><text:span text:style-name="T2">6.3. Збереження у базі даних</text:span></text:p>
      <text:p text:style-name="P5"><text:span text:style-name="T1">FlowerEntity — JPA-сутність з полями, що відповідають proto-структурі. Вбудовані об'єкти VisualParameters і GrowingTip зберігаються як @Embeddable. FlowerRepository розширює JpaRepository, надаючи стандартні CRUD-операції без додаткового коду.</text:span></text:p>
      <text:p text:style-name="P6"><text:span text:style-name="T2">6.4. Перевірка роботи</text:span></text:p>
      <text:p text:style-name="P5"><text:span text:style-name="T1">Після запуску застосунку та RabbitMQ надіслано gRPC-запит через grpcurl із заповненими полями Flower. У логах GreenProvider зафіксовано публікацію до черги; у логах Greenhouse — отримання та успішне збереження записи. Наявність запису підтверджено через H2 Console (http://localhost:8080/h2-console).</text:span></text:p>
      <text:p text:style-name="P4"><text:span text:style-name="T2">7. Висновки</text:span></text:p>
      <text:p text:style-name="P5"><text:span text:style-name="T1">Розроблено розподілений застосунок на основі gRPC і RabbitMQ у рамках предметної області «Оранжерея». Реалізовано повний цикл обробки даних: прийом запиту через gRPC → серіалізація у JSON → публікація до черги RabbitMQ → асинхронне споживання → збереження у базі даних. Засвоєно принципи AMQP-маршрутизації, конфігурації Spring AMQP та інтеграції двох протоколів (gRPC і AMQP) в єдиному застосунку.</text:span></text:p>
      <text:p text:style-name="P4"><text:span text:style-name="T2">8. Посилання</text:span></text:p>
      <text:p text:style-name="P6"><text:span text:style-name="T1">Репозиторій з вихідним кодом:<text:line-break/>https://github.com/javaAndScriptDeveloper/lolitech/tree/main/defi/submission2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4.2.7.2$Linux_X86_64 LibreOffice_project/420$Build-2</meta:generator>
    <meta:document-statistic meta:table-count="0" meta:image-count="0" meta:object-count="0" meta:page-count="3" meta:paragraph-count="43" meta:word-count="506" meta:character-count="4071" meta:non-whitespace-character-count="3569"/>
    <meta:user-defined meta:name="AppVersion">14.0000</meta:user-defined>
    <meta:template xlink:type="simple" xlink:actuate="onRequest" xlink:title="Normal.dotm" xlink:href=""/>
  </office:meta>
</office:document-meta>
</file>